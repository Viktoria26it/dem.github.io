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5.83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4.957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XO Thames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<text:span text:style-name="T1">Максимальный показатель</text:span></text:p>
          </table:table-cell>
          <table:table-cell table:style-name="ce1" office:value-type="string" calcext:value-type="string">
            <text:p><text:span text:style-name="T1">Сумма</text:span>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[.A2]+1)-1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3]+1)-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4]+1)-1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5]+1)-1"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6]+1)-1" office:value-type="float" office:value="31" calcext:value-type="float">
            <text:p>31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7]+1)-1" office:value-type="float" office:value="63" calcext:value-type="float">
            <text:p>6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8]+1)-1" office:value-type="float" office:value="127" calcext:value-type="float">
            <text:p>127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9]+1)-1" office:value-type="float" office:value="255" calcext:value-type="float">
            <text:p>255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10]+1)-1" office:value-type="float" office:value="511" calcext:value-type="float">
            <text:p>511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11]+1)-1" office:value-type="float" office:value="1023" calcext:value-type="float">
            <text:p>1023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12]+1)-1" office:value-type="float" office:value="2047" calcext:value-type="float">
            <text:p>2047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13]+1)-1" office:value-type="float" office:value="4095" calcext:value-type="float">
            <text:p>4095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14]+1)-1" office:value-type="float" office:value="8191" calcext:value-type="float">
            <text:p>8191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15]+1)-1" office:value-type="float" office:value="16383" calcext:value-type="float">
            <text:p>16383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16]+1)-1" office:value-type="float" office:value="32767" calcext:value-type="float">
            <text:p>32767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17]+1)-1" office:value-type="float" office:value="65535" calcext:value-type="float">
            <text:p>65535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18]+1)-1" office:value-type="float" office:value="131071" calcext:value-type="float">
            <text:p>131071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19]+1)-1" office:value-type="float" office:value="262143" calcext:value-type="float">
            <text:p>262143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20]+1)-1" office:value-type="float" office:value="524287" calcext:value-type="float">
            <text:p>524287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21]+1)-1" office:value-type="float" office:value="1048575" calcext:value-type="float">
            <text:p>1048575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22]+1)-1" office:value-type="float" office:value="2097151" calcext:value-type="float">
            <text:p>2097151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23]+1)-1" office:value-type="float" office:value="4194303" calcext:value-type="float">
            <text:p>4194303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24]+1)-1" office:value-type="float" office:value="8388607" calcext:value-type="float">
            <text:p>8388607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[.A25]+1)-1" office:value-type="float" office:value="16777215" calcext:value-type="float">
            <text:p>16777215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<text:span text:style-name="T1">Максимальный показатель</text:span></text:p>
          </table:table-cell>
          <table:table-cell table:style-name="ce1" office:value-type="string" calcext:value-type="string">
            <text:p><text:span text:style-name="T1">Сумма</text:span></text:p>
          </table:table-cell>
          <table:table-cell table:number-columns-repeated="1638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(3^([.A2]+1)-1)/2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(3^([.A3]+1)-1)/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(3^([.A4]+1)-1)/2"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(3^([.A5]+1)-1)/2" office:value-type="float" office:value="40" calcext:value-type="float">
            <text:p>40</text:p>
          </table:table-cell>
          <table:table-cell table:number-columns-repeated="1638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(3^([.A6]+1)-1)/2" office:value-type="float" office:value="121" calcext:value-type="float">
            <text:p>121</text:p>
          </table:table-cell>
          <table:table-cell table:number-columns-repeated="1638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(3^([.A7]+1)-1)/2" office:value-type="float" office:value="364" calcext:value-type="float">
            <text:p>364</text:p>
          </table:table-cell>
          <table:table-cell table:number-columns-repeated="1638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(3^([.A8]+1)-1)/2" office:value-type="float" office:value="1093" calcext:value-type="float">
            <text:p>1093</text:p>
          </table:table-cell>
          <table:table-cell table:number-columns-repeated="1638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(3^([.A9]+1)-1)/2" office:value-type="float" office:value="3280" calcext:value-type="float">
            <text:p>3280</text:p>
          </table:table-cell>
          <table:table-cell table:number-columns-repeated="1638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3^([.A10]+1)-1)/2" office:value-type="float" office:value="9841" calcext:value-type="float">
            <text:p>9841</text:p>
          </table:table-cell>
          <table:table-cell table:number-columns-repeated="1638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(3^([.A11]+1)-1)/2" office:value-type="float" office:value="29524" calcext:value-type="float">
            <text:p>29524</text:p>
          </table:table-cell>
          <table:table-cell table:number-columns-repeated="1638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(3^([.A12]+1)-1)/2" office:value-type="float" office:value="88573" calcext:value-type="float">
            <text:p>88573</text:p>
          </table:table-cell>
          <table:table-cell table:number-columns-repeated="1638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(3^([.A13]+1)-1)/2" office:value-type="float" office:value="265720" calcext:value-type="float">
            <text:p>265720</text:p>
          </table:table-cell>
          <table:table-cell table:number-columns-repeated="1638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(3^([.A14]+1)-1)/2" office:value-type="float" office:value="797161" calcext:value-type="float">
            <text:p>797161</text:p>
          </table:table-cell>
          <table:table-cell table:number-columns-repeated="1638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(3^([.A15]+1)-1)/2" office:value-type="float" office:value="2391484" calcext:value-type="float">
            <text:p>2391484</text:p>
          </table:table-cell>
          <table:table-cell table:number-columns-repeated="1638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(3^([.A16]+1)-1)/2" office:value-type="float" office:value="7174453" calcext:value-type="float">
            <text:p>7174453</text:p>
          </table:table-cell>
          <table:table-cell table:number-columns-repeated="1638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(3^([.A17]+1)-1)/2" office:value-type="float" office:value="21523360" calcext:value-type="float">
            <text:p>21523360</text:p>
          </table:table-cell>
          <table:table-cell table:number-columns-repeated="1638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3^([.A18]+1)-1)/2" office:value-type="float" office:value="64570081" calcext:value-type="float">
            <text:p>64570081</text:p>
          </table:table-cell>
          <table:table-cell table:number-columns-repeated="1638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(3^([.A19]+1)-1)/2" office:value-type="float" office:value="193710244" calcext:value-type="float">
            <text:p>193710244</text:p>
          </table:table-cell>
          <table:table-cell table:number-columns-repeated="1638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(3^([.A20]+1)-1)/2" office:value-type="float" office:value="581130733" calcext:value-type="float">
            <text:p>581130733</text:p>
          </table:table-cell>
          <table:table-cell table:number-columns-repeated="1638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(3^([.A21]+1)-1)/2" office:value-type="float" office:value="1743392200" calcext:value-type="float">
            <text:p>1743392200</text:p>
          </table:table-cell>
          <table:table-cell table:number-columns-repeated="1638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(3^([.A22]+1)-1)/2" office:value-type="float" office:value="5230176601" calcext:value-type="float">
            <text:p>5230176601</text:p>
          </table:table-cell>
          <table:table-cell table:number-columns-repeated="1638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(3^([.A23]+1)-1)/2" office:value-type="float" office:value="15690529804" calcext:value-type="float">
            <text:p>15690529804</text:p>
          </table:table-cell>
          <table:table-cell table:number-columns-repeated="1638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(3^([.A24]+1)-1)/2" office:value-type="float" office:value="47071589413" calcext:value-type="float">
            <text:p>47071589413</text:p>
          </table:table-cell>
          <table:table-cell table:number-columns-repeated="1638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(3^([.A25]+1)-1)/2" office:value-type="float" office:value="141214768240" calcext:value-type="float">
            <text:p>141214768240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<text:span text:style-name="T1">Максимальный показатель</text:span></text:p>
          </table:table-cell>
          <table:table-cell table:style-name="ce1" office:value-type="string" calcext:value-type="string">
            <text:p><text:span text:style-name="T1">Сумма для 2</text:span></text:p>
          </table:table-cell>
          <table:table-cell table:style-name="ce1" office:value-type="string" calcext:value-type="string">
            <text:p><text:span text:style-name="T1">Сумма для 3</text:span>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VLOOKUP([.A2]; [$Лист1.A:.B]; 2; 0)" office:value-type="float" office:value="1" calcext:value-type="float">
            <text:p>1</text:p>
          </table:table-cell>
          <table:table-cell table:style-name="ce2" table:formula="of:=VLOOKUP([.A2]; [$Лист2.A:.B]; 2; 0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VLOOKUP([.A3]; [$Лист1.A:.B]; 2; 0)" office:value-type="float" office:value="3" calcext:value-type="float">
            <text:p>3</text:p>
          </table:table-cell>
          <table:table-cell table:style-name="ce2" table:formula="of:=VLOOKUP([.A3]; [$Лист2.A:.B]; 2; 0)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VLOOKUP([.A4]; [$Лист1.A:.B]; 2; 0)" office:value-type="float" office:value="7" calcext:value-type="float">
            <text:p>7</text:p>
          </table:table-cell>
          <table:table-cell table:style-name="ce2" table:formula="of:=VLOOKUP([.A4]; [$Лист2.A:.B]; 2; 0)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VLOOKUP([.A5]; [$Лист1.A:.B]; 2; 0)" office:value-type="float" office:value="15" calcext:value-type="float">
            <text:p>15</text:p>
          </table:table-cell>
          <table:table-cell table:style-name="ce2" table:formula="of:=VLOOKUP([.A5]; [$Лист2.A:.B]; 2; 0)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VLOOKUP([.A6]; [$Лист1.A:.B]; 2; 0)" office:value-type="float" office:value="31" calcext:value-type="float">
            <text:p>31</text:p>
          </table:table-cell>
          <table:table-cell table:style-name="ce2" table:formula="of:=VLOOKUP([.A6]; [$Лист2.A:.B]; 2; 0)" office:value-type="float" office:value="121" calcext:value-type="float">
            <text:p>121</text:p>
          </table:table-cell>
          <table:table-cell table:number-columns-repeated="1638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VLOOKUP([.A7]; [$Лист1.A:.B]; 2; 0)" office:value-type="float" office:value="63" calcext:value-type="float">
            <text:p>63</text:p>
          </table:table-cell>
          <table:table-cell table:style-name="ce2" table:formula="of:=VLOOKUP([.A7]; [$Лист2.A:.B]; 2; 0)" office:value-type="float" office:value="364" calcext:value-type="float">
            <text:p>364</text:p>
          </table:table-cell>
          <table:table-cell table:number-columns-repeated="1638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VLOOKUP([.A8]; [$Лист1.A:.B]; 2; 0)" office:value-type="float" office:value="127" calcext:value-type="float">
            <text:p>127</text:p>
          </table:table-cell>
          <table:table-cell table:style-name="ce2" table:formula="of:=VLOOKUP([.A8]; [$Лист2.A:.B]; 2; 0)" office:value-type="float" office:value="1093" calcext:value-type="float">
            <text:p>1093</text:p>
          </table:table-cell>
          <table:table-cell table:number-columns-repeated="1638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VLOOKUP([.A9]; [$Лист1.A:.B]; 2; 0)" office:value-type="float" office:value="255" calcext:value-type="float">
            <text:p>255</text:p>
          </table:table-cell>
          <table:table-cell table:style-name="ce2" table:formula="of:=VLOOKUP([.A9]; [$Лист2.A:.B]; 2; 0)" office:value-type="float" office:value="3280" calcext:value-type="float">
            <text:p>3280</text:p>
          </table:table-cell>
          <table:table-cell table:number-columns-repeated="1638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VLOOKUP([.A10]; [$Лист1.A:.B]; 2; 0)" office:value-type="float" office:value="511" calcext:value-type="float">
            <text:p>511</text:p>
          </table:table-cell>
          <table:table-cell table:style-name="ce2" table:formula="of:=VLOOKUP([.A10]; [$Лист2.A:.B]; 2; 0)" office:value-type="float" office:value="9841" calcext:value-type="float">
            <text:p>9841</text:p>
          </table:table-cell>
          <table:table-cell table:number-columns-repeated="1638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VLOOKUP([.A11]; [$Лист1.A:.B]; 2; 0)" office:value-type="float" office:value="1023" calcext:value-type="float">
            <text:p>1023</text:p>
          </table:table-cell>
          <table:table-cell table:style-name="ce2" table:formula="of:=VLOOKUP([.A11]; [$Лист2.A:.B]; 2; 0)" office:value-type="float" office:value="29524" calcext:value-type="float">
            <text:p>29524</text:p>
          </table:table-cell>
          <table:table-cell table:number-columns-repeated="1638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VLOOKUP([.A12]; [$Лист1.A:.B]; 2; 0)" office:value-type="float" office:value="2047" calcext:value-type="float">
            <text:p>2047</text:p>
          </table:table-cell>
          <table:table-cell table:style-name="ce2" table:formula="of:=VLOOKUP([.A12]; [$Лист2.A:.B]; 2; 0)" office:value-type="float" office:value="88573" calcext:value-type="float">
            <text:p>88573</text:p>
          </table:table-cell>
          <table:table-cell table:number-columns-repeated="1638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VLOOKUP([.A13]; [$Лист1.A:.B]; 2; 0)" office:value-type="float" office:value="4095" calcext:value-type="float">
            <text:p>4095</text:p>
          </table:table-cell>
          <table:table-cell table:style-name="ce2" table:formula="of:=VLOOKUP([.A13]; [$Лист2.A:.B]; 2; 0)" office:value-type="float" office:value="265720" calcext:value-type="float">
            <text:p>265720</text:p>
          </table:table-cell>
          <table:table-cell table:number-columns-repeated="1638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VLOOKUP([.A14]; [$Лист1.A:.B]; 2; 0)" office:value-type="float" office:value="8191" calcext:value-type="float">
            <text:p>8191</text:p>
          </table:table-cell>
          <table:table-cell table:style-name="ce2" table:formula="of:=VLOOKUP([.A14]; [$Лист2.A:.B]; 2; 0)" office:value-type="float" office:value="797161" calcext:value-type="float">
            <text:p>797161</text:p>
          </table:table-cell>
          <table:table-cell table:number-columns-repeated="1638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VLOOKUP([.A15]; [$Лист1.A:.B]; 2; 0)" office:value-type="float" office:value="16383" calcext:value-type="float">
            <text:p>16383</text:p>
          </table:table-cell>
          <table:table-cell table:style-name="ce2" table:formula="of:=VLOOKUP([.A15]; [$Лист2.A:.B]; 2; 0)" office:value-type="float" office:value="2391484" calcext:value-type="float">
            <text:p>2391484</text:p>
          </table:table-cell>
          <table:table-cell table:number-columns-repeated="1638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VLOOKUP([.A16]; [$Лист1.A:.B]; 2; 0)" office:value-type="float" office:value="32767" calcext:value-type="float">
            <text:p>32767</text:p>
          </table:table-cell>
          <table:table-cell table:style-name="ce2" table:formula="of:=VLOOKUP([.A16]; [$Лист2.A:.B]; 2; 0)" office:value-type="float" office:value="7174453" calcext:value-type="float">
            <text:p>7174453</text:p>
          </table:table-cell>
          <table:table-cell table:number-columns-repeated="1638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VLOOKUP([.A17]; [$Лист1.A:.B]; 2; 0)" office:value-type="float" office:value="65535" calcext:value-type="float">
            <text:p>65535</text:p>
          </table:table-cell>
          <table:table-cell table:style-name="ce2" table:formula="of:=VLOOKUP([.A17]; [$Лист2.A:.B]; 2; 0)" office:value-type="float" office:value="21523360" calcext:value-type="float">
            <text:p>21523360</text:p>
          </table:table-cell>
          <table:table-cell table:number-columns-repeated="1638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VLOOKUP([.A18]; [$Лист1.A:.B]; 2; 0)" office:value-type="float" office:value="131071" calcext:value-type="float">
            <text:p>131071</text:p>
          </table:table-cell>
          <table:table-cell table:style-name="ce2" table:formula="of:=VLOOKUP([.A18]; [$Лист2.A:.B]; 2; 0)" office:value-type="float" office:value="64570081" calcext:value-type="float">
            <text:p>64570081</text:p>
          </table:table-cell>
          <table:table-cell table:number-columns-repeated="1638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VLOOKUP([.A19]; [$Лист1.A:.B]; 2; 0)" office:value-type="float" office:value="262143" calcext:value-type="float">
            <text:p>262143</text:p>
          </table:table-cell>
          <table:table-cell table:style-name="ce2" table:formula="of:=VLOOKUP([.A19]; [$Лист2.A:.B]; 2; 0)" office:value-type="float" office:value="193710244" calcext:value-type="float">
            <text:p>193710244</text:p>
          </table:table-cell>
          <table:table-cell table:number-columns-repeated="1638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VLOOKUP([.A20]; [$Лист1.A:.B]; 2; 0)" office:value-type="float" office:value="524287" calcext:value-type="float">
            <text:p>524287</text:p>
          </table:table-cell>
          <table:table-cell table:style-name="ce2" table:formula="of:=VLOOKUP([.A20]; [$Лист2.A:.B]; 2; 0)" office:value-type="float" office:value="581130733" calcext:value-type="float">
            <text:p>581130733</text:p>
          </table:table-cell>
          <table:table-cell table:number-columns-repeated="1638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VLOOKUP([.A21]; [$Лист1.A:.B]; 2; 0)" office:value-type="float" office:value="1048575" calcext:value-type="float">
            <text:p>1048575</text:p>
          </table:table-cell>
          <table:table-cell table:style-name="ce2" table:formula="of:=VLOOKUP([.A21]; [$Лист2.A:.B]; 2; 0)" office:value-type="float" office:value="1743392200" calcext:value-type="float">
            <text:p>1743392200</text:p>
          </table:table-cell>
          <table:table-cell table:number-columns-repeated="1638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VLOOKUP([.A22]; [$Лист1.A:.B]; 2; 0)" office:value-type="float" office:value="2097151" calcext:value-type="float">
            <text:p>2097151</text:p>
          </table:table-cell>
          <table:table-cell table:style-name="ce2" table:formula="of:=VLOOKUP([.A22]; [$Лист2.A:.B]; 2; 0)" office:value-type="float" office:value="5230176601" calcext:value-type="float">
            <text:p>5230176601</text:p>
          </table:table-cell>
          <table:table-cell table:number-columns-repeated="1638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VLOOKUP([.A23]; [$Лист1.A:.B]; 2; 0)" office:value-type="float" office:value="4194303" calcext:value-type="float">
            <text:p>4194303</text:p>
          </table:table-cell>
          <table:table-cell table:style-name="ce2" table:formula="of:=VLOOKUP([.A23]; [$Лист2.A:.B]; 2; 0)" office:value-type="float" office:value="15690529804" calcext:value-type="float">
            <text:p>15690529804</text:p>
          </table:table-cell>
          <table:table-cell table:number-columns-repeated="1638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VLOOKUP([.A24]; [$Лист1.A:.B]; 2; 0)" office:value-type="float" office:value="8388607" calcext:value-type="float">
            <text:p>8388607</text:p>
          </table:table-cell>
          <table:table-cell table:style-name="ce2" table:formula="of:=VLOOKUP([.A24]; [$Лист2.A:.B]; 2; 0)" office:value-type="float" office:value="47071589413" calcext:value-type="float">
            <text:p>47071589413</text:p>
          </table:table-cell>
          <table:table-cell table:number-columns-repeated="1638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VLOOKUP([.A25]; [$Лист1.A:.B]; 2; 0)" office:value-type="float" office:value="16777215" calcext:value-type="float">
            <text:p>16777215</text:p>
          </table:table-cell>
          <table:table-cell table:style-name="ce2" table:formula="of:=VLOOKUP([.A25]; [$Лист2.A:.B]; 2; 0)" office:value-type="float" office:value="141214768240" calcext:value-type="float">
            <text:p>141214768240</text:p>
          </table:table-cell>
          <table:table-cell table:number-columns-repeated="1638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4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<text:span text:style-name="T1">Статистическая функция</text:span></text:p>
          </table:table-cell>
          <table:table-cell table:style-name="ce1" office:value-type="string" calcext:value-type="string">
            <text:p><text:span text:style-name="T1">Для A (Лист3)</text:span></text:p>
          </table:table-cell>
          <table:table-cell table:style-name="ce1" office:value-type="string" calcext:value-type="string">
            <text:p><text:span text:style-name="T1">Для B (Лист3)</text:span></text:p>
          </table:table-cell>
          <table:table-cell table:style-name="ce1" office:value-type="string" calcext:value-type="string">
            <text:p><text:span text:style-name="T1">Для C (Лист3)</text:span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Среднее значение</text:p>
          </table:table-cell>
          <table:table-cell table:style-name="ce2" table:formula="of:=AVERAGE([$Лист3.A2:.A25])" office:value-type="float" office:value="11.5" calcext:value-type="float">
            <text:p>11,5</text:p>
          </table:table-cell>
          <table:table-cell table:style-name="ce2" table:formula="of:=AVERAGE([$Лист3.B2:.B25])" office:value-type="float" office:value="1398100.25" calcext:value-type="float">
            <text:p>1398100,25</text:p>
          </table:table-cell>
          <table:table-cell table:style-name="ce2" table:formula="of:=AVERAGE([$Лист3.C2:.C25])" office:value-type="float" office:value="8825923014.5" calcext:value-type="float">
            <text:p>8825923014,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Максимально значение</text:p>
          </table:table-cell>
          <table:table-cell table:style-name="ce2" table:formula="of:=MAX([$Лист3.A2:.A25])" office:value-type="float" office:value="23" calcext:value-type="float">
            <text:p>23</text:p>
          </table:table-cell>
          <table:table-cell table:style-name="ce2" table:formula="of:=MAX([$Лист3.B2:.B25])" office:value-type="float" office:value="16777215" calcext:value-type="float">
            <text:p>16777215</text:p>
          </table:table-cell>
          <table:table-cell table:style-name="ce2" table:formula="of:=MAX([$Лист3.C2:.C25])" office:value-type="float" office:value="141214768240" calcext:value-type="float">
            <text:p>141214768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Минимальное значение</text:p>
          </table:table-cell>
          <table:table-cell table:style-name="ce2" table:formula="of:=MIN([$Лист3.A2:.A25])" office:value-type="float" office:value="0" calcext:value-type="float">
            <text:p>0</text:p>
          </table:table-cell>
          <table:table-cell table:style-name="ce2" table:formula="of:=MIN([$Лист3.B2:.B25])" office:value-type="float" office:value="1" calcext:value-type="float">
            <text:p>1</text:p>
          </table:table-cell>
          <table:table-cell table:style-name="ce2" table:formula="of:=MIN([$Лист3.C2:.C25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Медиана</text:p>
          </table:table-cell>
          <table:table-cell table:style-name="ce2" table:formula="of:=MEDIAN([$Лист3.A2:.A25])" office:value-type="float" office:value="11.5" calcext:value-type="float">
            <text:p>11,5</text:p>
          </table:table-cell>
          <table:table-cell table:style-name="ce2" table:formula="of:=MEDIAN([$Лист3.B2:.B25])" office:value-type="float" office:value="6143" calcext:value-type="float">
            <text:p>6143</text:p>
          </table:table-cell>
          <table:table-cell table:style-name="ce2" table:formula="of:=MEDIAN([$Лист3.C2:.C25])" office:value-type="float" office:value="531440.5" calcext:value-type="float">
            <text:p>531440,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Мода</text:p>
          </table:table-cell>
          <table:table-cell table:style-name="ce2" table:formula="of:=IFERROR(COM.MICROSOFT.MODE.SNGL([$Лист3.A2:.A25]); &quot;Нет моды&quot;)" office:value-type="string" office:string-value="Нет моды" calcext:value-type="string">
            <text:p>Нет моды</text:p>
          </table:table-cell>
          <table:table-cell table:style-name="ce2" table:formula="of:=IFERROR(COM.MICROSOFT.MODE.SNGL([$Лист3.B2:.B25]); &quot;Нет моды&quot;)" office:value-type="string" office:string-value="Нет моды" calcext:value-type="string">
            <text:p>Нет моды</text:p>
          </table:table-cell>
          <table:table-cell table:style-name="ce2" table:formula="of:=IFERROR(COM.MICROSOFT.MODE.SNGL([$Лист3.C2:.C25]); &quot;Нет моды&quot;)" office:value-type="string" office:string-value="Нет моды" calcext:value-type="string">
            <text:p>Нет моды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Дисперсия</text:p>
          </table:table-cell>
          <table:table-cell table:style-name="ce2" table:formula="of:=COM.MICROSOFT.VAR.P([$Лист3.A2:.A25])" office:value-type="float" office:value="47.9166666666667" calcext:value-type="float">
            <text:p>47,9166666666667</text:p>
          </table:table-cell>
          <table:table-cell table:style-name="ce2" table:formula="of:=COM.MICROSOFT.VAR.P([$Лист3.B2:.B25])" office:value-type="float" office:value="13682811600895.9" calcext:value-type="float">
            <text:p>13682811600895,9</text:p>
          </table:table-cell>
          <table:table-cell table:style-name="ce2" table:formula="of:=COM.MICROSOFT.VAR.P([$Лист3.C2:.C25])" office:value-type="float" office:value="8.56866087740393E+020" calcext:value-type="float">
            <text:p>8,56866087740393E+020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5" table:style-name="ta5">
        <table:shapes>
          <draw:frame draw:z-index="0" draw:name="Chart 1" draw:style-name="gr1" draw:text-style-name="P1" svg:width="12.955cm" svg:height="9.577cm" svg:x="0.079cm" svg:y="3.228cm">
            <draw:object draw:notify-on-update-of-ranges="Лист5.A1:Лист5.A1 Лист5.B1:Лист5.H1 Лист5.A2:Лист5.A2 Лист5.B2:Лист5.H2 Лист5.A3:Лист5.A3 Лист5.B3:Лист5.H3 Лист5.A4:Лист5.A4 Лист5.B4:Лист5.H4 Лист5.A5:Лист5.A5 Лист5.B5:Лист5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6384" table:default-cell-style-name="Default"/>
        <table:table-row table:style-name="ro1">
          <table:table-cell/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Колледж 1</text:p>
          </table:table-cell>
          <table:table-cell table:style-name="ce2" office:value-type="float" office:value="1510000" calcext:value-type="float">
            <text:p>1510000</text:p>
          </table:table-cell>
          <table:table-cell table:style-name="ce2" office:value-type="float" office:value="2236476" calcext:value-type="float">
            <text:p>2236476</text:p>
          </table:table-cell>
          <table:table-cell table:style-name="ce2" office:value-type="float" office:value="1934765" calcext:value-type="float">
            <text:p>1934765</text:p>
          </table:table-cell>
          <table:table-cell table:style-name="ce2" office:value-type="float" office:value="4543534" calcext:value-type="float">
            <text:p>4543534</text:p>
          </table:table-cell>
          <table:table-cell table:style-name="ce2" office:value-type="float" office:value="2348887" calcext:value-type="float">
            <text:p>2348887</text:p>
          </table:table-cell>
          <table:table-cell table:style-name="ce2" office:value-type="float" office:value="1170004" calcext:value-type="float">
            <text:p>1170004</text:p>
          </table:table-cell>
          <table:table-cell table:style-name="ce2" office:value-type="float" office:value="2344598" calcext:value-type="float">
            <text:p>2344598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Колледж 2</text:p>
          </table:table-cell>
          <table:table-cell table:style-name="ce2" office:value-type="float" office:value="237800" calcext:value-type="float">
            <text:p>237800</text:p>
          </table:table-cell>
          <table:table-cell table:style-name="ce2" office:value-type="float" office:value="732647" calcext:value-type="float">
            <text:p>732647</text:p>
          </table:table-cell>
          <table:table-cell table:style-name="ce2" office:value-type="float" office:value="567672" calcext:value-type="float">
            <text:p>567672</text:p>
          </table:table-cell>
          <table:table-cell table:style-name="ce2" office:value-type="float" office:value="234234" calcext:value-type="float">
            <text:p>234234</text:p>
          </table:table-cell>
          <table:table-cell table:style-name="ce2" office:value-type="float" office:value="323217" calcext:value-type="float">
            <text:p>323217</text:p>
          </table:table-cell>
          <table:table-cell table:style-name="ce2" office:value-type="float" office:value="634423" calcext:value-type="float">
            <text:p>634423</text:p>
          </table:table-cell>
          <table:table-cell table:style-name="ce2" office:value-type="float" office:value="235455" calcext:value-type="float">
            <text:p>235455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Колледж 3</text:p>
          </table:table-cell>
          <table:table-cell table:style-name="ce2" office:value-type="float" office:value="3211400" calcext:value-type="float">
            <text:p>3211400</text:p>
          </table:table-cell>
          <table:table-cell table:style-name="ce2" office:value-type="float" office:value="4873837" calcext:value-type="float">
            <text:p>4873837</text:p>
          </table:table-cell>
          <table:table-cell table:style-name="ce2" office:value-type="float" office:value="3654654" calcext:value-type="float">
            <text:p>3654654</text:p>
          </table:table-cell>
          <table:table-cell table:style-name="ce2" office:value-type="float" office:value="3453453" calcext:value-type="float">
            <text:p>3453453</text:p>
          </table:table-cell>
          <table:table-cell table:style-name="ce2" office:value-type="float" office:value="5435323" calcext:value-type="float">
            <text:p>5435323</text:p>
          </table:table-cell>
          <table:table-cell table:style-name="ce2" office:value-type="float" office:value="4586959" calcext:value-type="float">
            <text:p>4586959</text:p>
          </table:table-cell>
          <table:table-cell table:style-name="ce2" office:value-type="float" office:value="8576885" calcext:value-type="float">
            <text:p>8576885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Колледж 4</text:p>
          </table:table-cell>
          <table:table-cell table:style-name="ce2" office:value-type="float" office:value="4961201" calcext:value-type="float">
            <text:p>4961201</text:p>
          </table:table-cell>
          <table:table-cell table:style-name="ce2" office:value-type="float" office:value="7844962" calcext:value-type="float">
            <text:p>7844962</text:p>
          </table:table-cell>
          <table:table-cell table:style-name="ce2" office:value-type="float" office:value="6159094" calcext:value-type="float">
            <text:p>6159094</text:p>
          </table:table-cell>
          <table:table-cell table:style-name="ce2" office:value-type="float" office:value="8233225" calcext:value-type="float">
            <text:p>8233225</text:p>
          </table:table-cell>
          <table:table-cell table:style-name="ce2" office:value-type="float" office:value="8109432" calcext:value-type="float">
            <text:p>8109432</text:p>
          </table:table-cell>
          <table:table-cell table:style-name="ce2" office:value-type="float" office:value="6393392" calcext:value-type="float">
            <text:p>6393392</text:p>
          </table:table-cell>
          <table:table-cell table:style-name="ce2" office:value-type="float" office:value="11158945" calcext:value-type="float">
            <text:p>11158945</text:p>
          </table:table-cell>
          <table:table-cell table:number-columns-repeated="16376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4cm" fo:page-height="29.718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8:14:58</meta:creation-date>
    <dc:date>2026-05-04T08:14:58</dc:date>
    <meta:editing-duration>P0D</meta:editing-duration>
    <meta:generator>LibreOffice/7.5.2.1$Linux_X86_64 LibreOffice_project/50$Build-1</meta:generator>
    <meta:document-statistic meta:table-count="5" meta:cell-count="242" meta:object-count="1"/>
    <meta:template xlink:type="simple" xlink:actuate="onRequest" xlink:title="Normal.dotm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XO Thames'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18cm" svg:stroke-color="#878787"/>
      <style:text-properties fo:color="#000000" style:text-position="0% 100%" fo:font-family="'XO Thames'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18cm" svg:stroke-color="#878787"/>
      <style:text-properties fo:color="#000000" style:text-position="0% 100%" fo:font-family="'XO Thames'" fo:font-size="10pt" style:font-size-asian="10pt" style:font-size-complex="10pt"/>
    </style:style>
    <style:style style:name="ch6" style:family="chart">
      <style:graphic-properties svg:stroke-width="0.035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c0504d" draw:fill-color="#c0504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9bbb59" draw:fill-color="#9bbb5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8064a2" draw:fill-color="#8064a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4bacc6" draw:fill-color="#4bacc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956cm" svg:height="9.578cm" xlink:href=".." xlink:type="simple" chart:class="chart:line" chart:style-name="ch1">
        <chart:legend chart:legend-position="bottom" svg:x="2.395cm" svg:y="8.481cm" style:legend-expansion="wide" chart:style-name="ch2"/>
        <chart:plot-area chart:style-name="ch3" table:cell-range-address="Лист5.A1:Лист5.H5" chart:data-source-has-labels="column" svg:x="0.259cm" svg:y="0.191cm" svg:width="12.438cm" svg:height="7.915cm">
          <chart:coordinate-region svg:x="1.992cm" svg:y="0.391cm" svg:width="10.705cm" svg:height="7.0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5.B1:Лист5.H1" chart:label-cell-address="Лист5.A1:Лист5.A1" chart:class="chart:line">
            <chart:data-point chart:repeated="7"/>
          </chart:series>
          <chart:series chart:style-name="ch8" chart:values-cell-range-address="Лист5.B2:Лист5.H2" chart:label-cell-address="Лист5.A2:Лист5.A2" chart:class="chart:line">
            <chart:data-point chart:repeated="7"/>
          </chart:series>
          <chart:series chart:style-name="ch9" chart:values-cell-range-address="Лист5.B3:Лист5.H3" chart:label-cell-address="Лист5.A3:Лист5.A3" chart:class="chart:line">
            <chart:data-point chart:repeated="7"/>
          </chart:series>
          <chart:series chart:style-name="ch10" chart:values-cell-range-address="Лист5.B4:Лист5.H4" chart:label-cell-address="Лист5.A4:Лист5.A4" chart:class="chart:line">
            <chart:data-point chart:repeated="7"/>
          </chart:series>
          <chart:series chart:style-name="ch11" chart:values-cell-range-address="Лист5.B5:Лист5.H5" chart:label-cell-address="Лист5.A5:Лист5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5.A1:Лист5.A1</svg:desc>
                </draw:g>
              </table:table-cell>
              <table:table-cell office:value-type="float" office:value="2021">
                <text:p>2021</text:p>
                <draw:g>
                  <svg:desc>Лист5.B1:Лист5.H1</svg:desc>
                </draw:g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Колледж 1</text:p>
                <draw:g>
                  <svg:desc>Лист5.A2:Лист5.A2</svg:desc>
                </draw:g>
              </table:table-cell>
              <table:table-cell office:value-type="float" office:value="1510000">
                <text:p>1510000</text:p>
                <draw:g>
                  <svg:desc>Лист5.B2:Лист5.H2</svg:desc>
                </draw:g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  <draw:g>
                  <svg:desc>Лист5.A3:Лист5.A3</svg:desc>
                </draw:g>
              </table:table-cell>
              <table:table-cell office:value-type="float" office:value="237800">
                <text:p>237800</text:p>
                <draw:g>
                  <svg:desc>Лист5.B3:Лист5.H3</svg:desc>
                </draw:g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  <draw:g>
                  <svg:desc>Лист5.A4:Лист5.A4</svg:desc>
                </draw:g>
              </table:table-cell>
              <table:table-cell office:value-type="float" office:value="3211400">
                <text:p>3211400</text:p>
                <draw:g>
                  <svg:desc>Лист5.B4:Лист5.H4</svg:desc>
                </draw:g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  <draw:g>
                  <svg:desc>Лист5.A5:Лист5.A5</svg:desc>
                </draw:g>
              </table:table-cell>
              <table:table-cell office:value-type="float" office:value="4961201">
                <text:p>4961201</text:p>
                <draw:g>
                  <svg:desc>Лист5.B5:Лист5.H5</svg:desc>
                </draw:g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